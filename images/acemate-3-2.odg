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4000007E9D2CC2FA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608cm" fo:min-width="11.88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4.486cm" svg:x="1cm" svg:y="1.726cm">
          <draw:image xlink:href="Pictures/1000000000000654000007E9D2CC2FA0.jpg" xlink:type="simple" xlink:show="embed" xlink:actuate="onLoad" draw:mime-type="image/jpeg">
            <text:p/>
          </draw:image>
        </draw:frame>
        <draw:custom-shape draw:style-name="gr2" draw:text-style-name="P2" draw:layer="layout" svg:width="12.382cm" svg:height="2.858cm" svg:x="4.275cm" svg:y="4.5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02T17:22:45.014417700</dc:date>
    <meta:editing-duration>PT57S</meta:editing-duration>
    <meta:editing-cycles>1</meta:editing-cycles>
    <meta:document-statistic meta:object-count="2"/>
    <meta:generator>LibreOffice/26.2.3.2$Windows_X86_64 LibreOffice_project/70e089b17412e4cb7773e41413306b17a2328c34</meta:generator>
  </office:meta>
</office:document-meta>
</file>